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color="#e36c0a" fo:language="en" fo:country="US"/>
    </style:style>
    <style:style style:name="P6" style:family="paragraph" style:parent-style-name="Standard">
      <style:paragraph-properties fo:text-align="justify" style:justify-single-word="false"/>
      <style:text-properties fo:color="#4f81bd" fo:font-size="11pt" fo:language="pt" fo:country="PT" style:font-size-asian="11pt" style:font-size-complex="11pt"/>
    </style:style>
    <style:style style:name="P7" style:family="paragraph" style:parent-style-name="Standard">
      <style:paragraph-properties fo:text-align="justify" style:justify-single-word="false"/>
      <style:text-properties fo:language="pt" fo:country="PT"/>
    </style:style>
    <style:style style:name="P8" style:family="paragraph" style:parent-style-name="Standard">
      <style:paragraph-properties fo:text-align="justify" style:justify-single-word="false"/>
      <style:text-properties fo:color="#3399ff" fo:language="pt" fo:country="PT"/>
    </style:style>
    <style:style style:name="P9" style:family="paragraph" style:parent-style-name="Standard">
      <style:paragraph-properties fo:text-align="justify" style:justify-single-word="false"/>
      <style:text-properties fo:color="#3399ff"/>
    </style:style>
    <style:style style:name="P10" style:family="paragraph" style:parent-style-name="Standard">
      <style:paragraph-properties fo:line-height="100%" fo:padding="0cm" fo:border="none">
        <style:tab-stops>
          <style:tab-stop style:position="7.96cm" style:type="center"/>
          <style:tab-stop style:position="15.921cm" style:type="right"/>
        </style:tab-stops>
      </style:paragraph-properties>
    </style:style>
    <style:style style:name="P11" style:family="paragraph" style:parent-style-name="Standard" style:master-page-name="Standard">
      <style:paragraph-properties fo:text-align="center" style:justify-single-word="false" style:page-number="auto"/>
    </style:style>
    <style:style style:name="T1" style:family="text">
      <style:text-properties fo:font-size="12pt" fo:font-weight="bold" style:font-size-asian="12pt" style:font-weight-asian="bold" style:font-size-complex="12pt"/>
    </style:style>
    <style:style style:name="T2" style:family="text">
      <style:text-properties fo:color="#e36c0a"/>
    </style:style>
    <style:style style:name="T3" style:family="text">
      <style:text-properties fo:color="#e36c0a" fo:language="en" fo:country="US"/>
    </style:style>
    <style:style style:name="T4" style:family="text">
      <style:text-properties fo:color="#e36c0a" fo:language="en" fo:country="US" fo:font-style="italic" style:font-style-asian="italic"/>
    </style:style>
    <style:style style:name="T5" style:family="text">
      <style:text-properties fo:language="en" fo:country="US"/>
    </style:style>
    <style:style style:name="T6" style:family="text">
      <style:text-properties fo:language="en" fo:country="US" fo:background-color="#ffff00"/>
    </style:style>
    <style:style style:name="T7" style:family="text">
      <style:text-properties fo:background-color="#ffffff"/>
    </style:style>
    <style:style style:name="T8" style:family="text">
      <style:text-properties fo:color="#444746"/>
    </style:style>
    <style:style style:name="T9" style:family="text">
      <style:text-properties fo:color="#4f81bd" fo:font-size="11pt" style:font-size-asian="11pt" style:font-size-complex="11pt"/>
    </style:style>
    <style:style style:name="T10" style:family="text">
      <style:text-properties fo:color="#3399ff"/>
    </style:style>
    <style:style style:name="T11" style:family="text">
      <style:text-properties fo:color="#3399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Bookmark"/><text:span text:style-name="T1">MANIFIESTO CAMBIANTE Y NUNCA CUMPLIDO DEL COLECTIVO</text:span></text:p>
      <text:p text:style-name="P1"><text:span text:style-name="T1">FUERA DE LUGAR</text:span></text:p>
      <text:p text:style-name="P1"><text:span text:style-name="T1">www.cfdl.site</text:span></text:p>
      <text:p text:style-name="P2"/>
      <text:p text:style-name="P3">… Escogemos un mundo de ciudades recordadas, siempre en construcción, en terrenos donde no deberían estar. Reivindicamos el exilio y el destierro, la creación como una solicitud de asilo, el viaje como acto frustrante e improductivo. Proponemos viajar, a pesar de todo. Navegar quitándole a la brújula su imán y, así, deambular hasta perder de vista lo inmutable. Crear donde no alcance ninguna raíz. </text:p>
      <text:p text:style-name="P3"><text:s/></text:p>
      <text:p text:style-name="P3"><text:span text:style-name="T3">… We choose a world of recalled cities, always in construction, built on unexpected grounds. We claim exile and deportation, creation as a request for asylum, and the journey as a frustrating and unproductive act. We encourage travel, in spite of everything. Navigating, ripping the magnet from the compass, and so wandering until the unyielding is out of sight. Creating where roots cannot reach. <text:s/></text:span></text:p>
      <text:p text:style-name="P3"><text:span text:style-name="T3"/></text:p>
      <text:p text:style-name="P6">… Escolhemos um mundo de cidades recordadas, sempre em construção, em terrenos onde não deviam estar. Reivindicamos o exílio e o desterro, a criação como um pedido de asilo, a viagem como ato frustrante e improdutivo. Propomos viajar, apesar de tudo, Navegar roubando à borbulha o seu íman e, assim, deambular até perder de vista o imutável. Criar onde nenhuma raiz pode alcançar.</text:p>
      <text:p text:style-name="P4"/>
      <text:p text:style-name="P3">… Defendemos una creación extemporánea, políglota y ubicua, que emana de la cultura del subsuelo. Creemos en una identidad inquieta, de paso hacia la incertidumbre. Y así, al mirar atrás, encontrar un camino personal lleno de maleza, con el trazo desvanecido, imposible de volver a recorrer. Al mirar hacia adelante, la misma maleza. No creamos para averiguar lo que somos sino para dejar de ser quien somos.</text:p>
      <text:p text:style-name="P3"/>
      <text:p text:style-name="P3"><text:span text:style-name="T3">… We defend extemporaneous, polyglot and ubiquitous creations, stemming from an underground culture. We believe in a restless identity, on the way to uncertainty. Looking back, finding each of our paths covered in greenery, its trail faded and impossible to retrace. Looking ahead, that same underbrush. We don’t create to figure out who we are, but to discard ourselves altogether.</text:span></text:p>
      <text:p text:style-name="P3"><text:span text:style-name="T3"/></text:p>
      <text:p text:style-name="P7"><text:span text:style-name="T9">… Defendemos uma criação extemporânea, poliglota e ubíqua, que emana da cultura do subsolo. Cremos numa identidade inquieta, a caminho até à incerteza. E assim, ao olhar para trás, encontrar um caminho pessoal cheio de malícia, com um traço desvanecido, impossível de voltar a percorrer. Ao olhar em frente, a mesma malícia. Não criamos para averiguar o que somos se não para deixar de ser quem somos. </text:span><text:span text:style-name="T2"><text:s/></text:span></text:p>
      <text:p text:style-name="P4"/>
      <text:p text:style-name="P3">… Buscamos la extenuación: de la palabra, de los recursos, de la energía corporal. Frente a la moderación y el ahorro, el dispendio, la condena voluntaria, la libertad perdida a posta: sentir el vértigo, las náuseas, el malestar de asomarse a una garganta sin fondo. La creación como trastorno. Sumirse en los instantes de verdadero pánico: avanzar a favor, y no en contra, de la angustia. </text:p>
      <text:p text:style-name="P3"/>
      <text:p text:style-name="P3"><text:soft-page-break/><text:span text:style-name="T3">… We search for consumption: of word, resource and bodily energy. Against moderation and frugality come the squandering, the voluntary sentence, and the freedom intentionally lost: feeling the vertigo and nausea, the unsettling feeling of peeking over a bottomless gorge. Creation as an affliction. Plunging into instants of true panic: moving towards, and not away from, angst. <text:s/></text:span></text:p>
      <text:p text:style-name="P3"><text:span text:style-name="T3"/></text:p>
      <text:p text:style-name="P6">… Procuramos a exaustão: da palavra, dos recursos, da energia corporal. Contra a moderação e a frugalidade, o desperdício, a convicção voluntária, a liberdade perdida propositadamente: sentir a vertigem, as náuseas, o mal-estar de aproximar-se a uma garganta sem fundo. A criação como um transtorno. Afundar-se nos instantes de verdadeiro pânico: avançar a favor, e não em contra, da angustia.</text:p>
      <text:p text:style-name="P3"><text:span text:style-name="T6"><text:s/></text:span></text:p>
      <text:p text:style-name="P3">… Invocamos el suicidio creativo como material ligero, como acto rutinario, parte del quehacer cotidiano. La inmadurez como propósito. La prótesis antes que la cura o la rehabilitación. Sin embargo, antes de la prótesis, la fractura profiláctica. Más tarde, resucitar en vida: como contraposición y con la misma ligereza, pero siempre en algún otro lugar.</text:p>
      <text:p text:style-name="P3"/>
      <text:p text:style-name="P3"><text:span text:style-name="T3">… We invoke creative suicide as a light task, an everyday act, a part of the mundane. Immaturity as a purpose. Prosthesis before healing or rehabilitation; and before that, the prophylactic fracture. Later on, a living resurrection: still dissenting and lightweight, but always elsewhere.</text:span></text:p>
      <text:p text:style-name="P3"><text:span text:style-name="T3"/></text:p>
      <text:p text:style-name="P6">… Invocamos o suicídio criativo como material leve, como ato rotineiro, parte da atividade quotidiana. A imaturidade como propósito. A prótese antes que a cura o reabilitação. Porém, antes da prótese, a fratura profiláctica. Mais tarde, ressuscitar na vida: como contraposição e com a mesma ligeireza, mas sempre em qualquer noutro lugar.</text:p>
      <text:p text:style-name="P3"><text:span text:style-name="T3"><text:s text:c="2"/></text:span></text:p>
      <text:p text:style-name="P3">… Aspiramos al producto deforme, siempre inacabado, de una idea; a la ofuscación abnegada como forma de claridad. Abrazamos nuestros defectos y desterramos la coherencia para crear desde la enajenación, atónitos. Afrontamos el futuro con una esperanza voraz, sobrante, con el ímpetu de las expectativas desmedidas. El pasado lo contemplamos con una nostalgia atroz. </text:p>
      <text:p text:style-name="P3"/>
      <text:p text:style-name="P3"><text:span text:style-name="T3">… We aspire towards the misshapen artifact, eternally unfinished, of an idea; devoted bewilderment as a form of clarity. We embrace our flaws and sacrifice coherence in favor of alienated creation, stunned. We face the future with insatiable hope, overflowing, with the drive of unchecked expectations. We regard the past with appalling nostalgia. </text:span></text:p>
      <text:p text:style-name="P4"/>
      <text:p text:style-name="P8">… Aspiramos ao produto disforme, sempre inacabado, de uma ideia: de uma ofuscação altruísta como forma de clareza. Abraçamos os nossos defeitos e banimos a coerência para criar desde a alienação, atónitos. Enfrentamos o futuro com uma esperança voraz, excedente, com o ímpeto, das expectativas excessivas. Contemplamos o passado com uma nostalgia atroz. </text:p>
      <text:p text:style-name="P4"/>
      <text:p text:style-name="P3">… Nacemos solos y morimos solos: entre un momento y otro, el camino se hace en compañía. No hay creación sin amistad; tampoco hay amistad sin sufrimiento compartido. Sin embargo, por encima de la empatía, promulgamos la opacidad, y apelamos a la <text:soft-page-break/>tolerancia, no desde la comprensión sino de la aceptación de las zonas oscuras del otro, desde el extrañamiento y la perplejidad.</text:p>
      <text:p text:style-name="P3"><text:s/></text:p>
      <text:p text:style-name="P3"><text:span text:style-name="T3">… We are born alone, and so do we expire: between both, the path must be shared. There is no creation without camaraderie; there is also no bond without common suffering. Nonetheless, we promote opaqueness over empathy, and call for tolerance, born not from understanding, but acceptance, of each other’s dark corners; born from estrangement and perplexity. </text:span></text:p>
      <text:p text:style-name="P3"><text:span text:style-name="T3"/></text:p>
      <text:p text:style-name="P8">… Nascemos sós e morremos sós: entre um momento e outro, o caminho faz-se em companhia. Não há criação sem amizade: também não há amizade sem sofrimento partilhado. Porém, acima da empatia, promulgamos a opacidade, e apelamos à tolerância, não desde a compreensão senão da aceitação das zonas obscura do outro, desde o distanciamento a à perplexidade.</text:p>
      <text:p text:style-name="P5"><text:span text:style-name="T5"/></text:p>
      <text:p text:style-name="P3">… Elegimos, entre el individuo y la colectividad, ambas opciones. Definir lo íntimo con pedazos de lo público. La creación como acto grupal, edificando relatos sobre muros derribados. Y así, compartir lo que se crea, sujetos a la inseguridad, al miedo a la opinión ajena, pero también a la necesidad de hacerlo. Formar una descendencia bastarda, desheredada y con traumas. No existe la tradición sin heterodoxia, ni hay modernidad sin memoria. Elegir entre ellas es dudar entre dos infinitos: habitar entre ellos, nuestra única opción. </text:p>
      <text:p text:style-name="P3"/>
      <text:p text:style-name="P3"><text:span text:style-name="T3">… We, given the choice of individual or collective, choose both. Defining the intimate from fragments of the communal. Creation as a group effort, building stories on top of fallen barriers. And so, we share what is created; we share tied to insecurity and scrutiny from others, but also to an unavoidable need to do so. Nurturing bastard offspring, disowned and traumatized. There is no tradition without heterodoxy, nor modernity without memory. Choosing one or the other is hesitating between two infinites: life in the in-between, our only choice. </text:span></text:p>
      <text:p text:style-name="P3"><text:span text:style-name="T3"/></text:p>
      <text:p text:style-name="P8">… Escolhemos, entre o indivíduo e coletivo, ambas opções. Definido o intimo com fragmentos do público. A criação como ato em grupo, edificando histórias sobre muros derrubados. E assim, partilhar o que se cria, sujeitos à insegurança, ao medo da opinião alheia, mas também com a necessidade de o fazer. Formar uma descendência bastarda, deserdada e com traumas. Não existe tradição sem heterodoxia, nem modernidade sem memória. Escolha entre elas é duvidar entre dois infinitos: viver entre eles, a nossa única opção.</text:p>
      <text:p text:style-name="P4"/>
      <text:p text:style-name="P3"><text:span text:style-name="T5">… Tenemos opiniones estéticas inamovibles. </text:span>Abrazamos, sin embargo, todas las demás. <text:s/>Una fusión más allá de lo mestizo, surgida de la descomposición de las expectativas de lo que pudo ser. El reciclado como fuente de material artístico: el contenedor de materia orgánica como venero creativo. <text:span text:style-name="T7">Arte con aquello que el mar le entrega al náufrago.</text:span> En lo ético, igual que en lo estético, la misma disposición.</text:p>
      <text:p text:style-name="P3"/>
      <text:p text:style-name="P3"><text:span text:style-name="T3">… We carry steadfast aesthetic opinions. We embrace, however, those who differ. A combination beyond </text:span><text:span text:style-name="T4">mestizo</text:span><text:span text:style-name="T3">, sourced from the decay of “what could have been” </text:span><text:soft-page-break/><text:span text:style-name="T3">expectations. Recycling becomes artistic fertilizer: organic waste is a creative spring. Art made from what the sea gifts the castaway. In Ethics, as in Aesthetics, the same disposition.</text:span></text:p>
      <text:p text:style-name="P3"><text:span text:style-name="T3"/></text:p>
      <text:p text:style-name="P7"><text:span text:style-name="T10">… Temos opções estáticas inamovivéis. Abraçamos, no entanto, todas as demais. Uma fusão más além do mestiço, surgida da decomposição das expectativas do que poderia ter sido. O reciclado como fonte de material artístico, o contentor de matéria orgânica como venero criativo (</text:span><text:span text:style-name="T11">tío no comprendí venero y tampoco encontré una definición</text:span><text:span text:style-name="T10">). Arte com aquilo que o mar entrega ao náufrago. No ético, igual ao estético, a mesma disposição.</text:span></text:p>
      <text:p text:style-name="P7"><text:span text:style-name="T10"/></text:p>
      <text:p text:style-name="P3">… Celebramos el plagio, la copia, la búsqueda promiscua de todo tipo de material creativo. Reivindicamos los lugares comunes como salida y como meta, también como zona de paso: aduanas desde las que atravesar fronteras. Frente a la marca personal, la marca blanca, la copia manufacturada en talleres ilegales. Entendemos la creación desde el travestismo, con la mirada detrás de una máscara, de cientos de ellas. </text:p>
      <text:p text:style-name="P3"/>
      <text:p text:style-name="P3"><text:span text:style-name="T3">… We celebrate plagiarism, copycats, the promiscuous endeavor of finding a creative motherlode. We claim commonplaces as an exit strategy, and a goal, and a passageway: customs through which to cross frontiers. In the face of personal branding, the generic, the manufactured copy in illegal shops. We understand creation through drag, looking beyond a mask, beyond hundreds of them.</text:span></text:p>
      <text:p text:style-name="P4"/>
      <text:p text:style-name="P8">… Celebramos o plágio, a cópia, a procura promiscua de todo o tipo de material criativo. Reivindicamos os lugares comuns como partida e como meta, também como zona de transição: alfândegas a partir das quais atravessar fronteiras. Contra a marca pessoal, a marca branca, a cópia produzida em oficinas ilegais. Entendemos a criação desde o travestismo, com o olhar por detrás de uma máscara, centenas de elas.</text:p>
      <text:p text:style-name="P4"/>
      <text:p text:style-name="P3">… Usamos lo atópico, antes que lo utópico o lo distópico. Y ante la síntesis, la disgregación. Creamos para exponer en un museo que nunca llegaremos a visitar: <text:s/>la obra se marchita el día que encuentra su público. Construimos pensando en las ruinas, la llegada del moho, y su inevitable abandono.<text:span text:style-name="T8"> </text:span>La obra mejora siempre, de cualquiera de las maneras, si está fuera de lugar.</text:p>
      <text:p text:style-name="P3"/>
      <text:p text:style-name="P3"><text:span text:style-name="T3">… We use the atopic before the utopic or dystopic. And against synthesis, disintegration. We create to exhibit in museums we won’t visit: the artist’s work withers away the day it meets its public. We build because we think of ruins; mold settling in, and the inevitable neglect. The work will always grow better, in any shape or form, if it is out of place.</text:span></text:p>
      <text:p text:style-name="P3"><text:span text:style-name="T3"/></text:p>
      <text:p text:style-name="P9"><text:span text:style-name="T5">… <text:s/>Usamos o atópico, antes que o utópico ou distópico.E perante a síntese, a desgregação. Criamos para expôr num museu que nunca chegaremos a visitar: a obra murcha o dia que encontra o seu público. Construímos pensando nas ruínas, na chegada do bolor, e no seu inevitável abandono. A obra melhora sempre, de qualquer maneira, se está for a do seu lug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s" fo:country="ES"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padding="0cm" fo:border="none">
        <style:tab-stops>
          <style:tab-stop style:position="7.96cm" style:type="center"/>
          <style:tab-stop style:position="15.92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SAURO, VARO COBOS</meta:initial-creator>
    <meta:editing-cycles>2</meta:editing-cycles>
    <meta:creation-date>2023-10-19T18:36:00</meta:creation-date>
    <dc:date>2024-02-18T20:07:56.56</dc:date>
    <meta:editing-duration>P0D</meta:editing-duration>
    <meta:generator>OpenOffice/4.1.15$Win32 OpenOffice.org_project/4115m2$Build-9813</meta:generator>
    <meta:document-statistic meta:table-count="0" meta:image-count="0" meta:object-count="0" meta:page-count="4" meta:paragraph-count="37" meta:word-count="1894" meta:character-count="118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